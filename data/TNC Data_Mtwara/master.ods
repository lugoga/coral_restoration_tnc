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/>
    <style:font-face style:name="Arimo" svg:font-family="Arim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99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0.7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9pt" fo:font-style="normal" fo:text-shadow="none" style:text-underline-style="none" fo:font-weight="bold" style:font-size-asian="9pt" style:font-style-asian="normal" style:font-weight-asian="bold" style:font-name-complex="Arimo" style:font-size-complex="9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9pt" fo:font-style="normal" fo:text-shadow="none" style:text-underline-style="none" fo:font-weight="bold" style:font-size-asian="9pt" style:font-style-asian="normal" style:font-weight-asian="bold" style:font-name-complex="Arimo" style:font-size-complex="9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enthic_substrate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ce4"/>
        <table:table-row table:style-name="ro1">
          <table:table-cell table:style-name="ce1" office:value-type="string" calcext:value-type="string">
            <text:p>Date (dd/mm/year)</text:p>
          </table:table-cell>
          <table:table-cell office:value-type="string" calcext:value-type="string">
            <text:p>Si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Transect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Assistant</text:p>
          </table:table-cell>
          <table:table-cell table:style-name="ce1" office:value-type="string" calcext:value-type="string">
            <text:p>Tide</text:p>
          </table:table-cell>
          <table:table-cell table:style-name="ce1" office:value-type="string" calcext:value-type="string">
            <text:p>Exposure</text:p>
          </table:table-cell>
          <table:table-cell table:style-name="ce1" office:value-type="string" calcext:value-type="string">
            <text:p>Depth (m)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2" office:value-type="string" calcext:value-type="string">
            <text:p>Transect</text:p>
          </table:table-cell>
          <table:table-cell table:style-name="ce2" office:value-type="string" calcext:value-type="string">
            <text:p>L#</text:p>
          </table:table-cell>
          <table:table-cell table:style-name="ce3" office:value-type="string" calcext:value-type="string">
            <text:p>Hard Coral</text:p>
          </table:table-cell>
          <table:table-cell table:style-name="ce3" office:value-type="string" calcext:value-type="string">
            <text:p>Algal Turf</text:p>
          </table:table-cell>
          <table:table-cell table:style-name="ce3" office:value-type="string" calcext:value-type="string">
            <text:p>Calcareous</text:p>
          </table:table-cell>
          <table:table-cell table:style-name="ce3" office:value-type="string" calcext:value-type="string">
            <text:p>Fleshyalgae</text:p>
          </table:table-cell>
          <table:table-cell table:style-name="ce5" office:value-type="string" calcext:value-type="string">
            <text:p>Coralline</text:p>
          </table:table-cell>
          <table:table-cell table:style-name="ce3" office:value-type="string" calcext:value-type="string">
            <text:p><text:s/>seagrass</text:p>
          </table:table-cell>
          <table:table-cell table:style-name="ce3" office:value-type="string" calcext:value-type="string">
            <text:p>Softcoral</text:p>
          </table:table-cell>
          <table:table-cell table:style-name="ce3" office:value-type="string" calcext:value-type="string">
            <text:p>Sand</text:p>
          </table:table-cell>
          <table:table-cell table:style-name="ce3" office:value-type="string" calcext:value-type="string">
            <text:p>Sponge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8585858585859" calcext:value-type="float">
            <text:p>85.86</text:p>
          </table:table-cell>
          <table:table-cell table:number-columns-repeated="2"/>
          <table:table-cell office:value-type="float" office:value="7.07070707070707" calcext:value-type="float">
            <text:p>7.07</text:p>
          </table:table-cell>
          <table:table-cell office:value-type="float" office:value="2.02020202020202" calcext:value-type="float">
            <text:p>2.02</text:p>
          </table:table-cell>
          <table:table-cell/>
          <table:table-cell office:value-type="float" office:value="1.01010101010101" calcext:value-type="float">
            <text:p>1.01</text:p>
          </table:table-cell>
          <table:table-cell/>
          <table:table-cell office:value-type="float" office:value="4.04040404040404" calcext:value-type="float">
            <text:p>4.04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.00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office:value-type="float" office:value="23" calcext:value-type="float">
            <text:p>23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.4" calcext:value-type="float">
            <text:p>86.40</text:p>
          </table:table-cell>
          <table:table-cell table:number-columns-repeated="2"/>
          <table:table-cell office:value-type="float" office:value="4" calcext:value-type="float">
            <text:p>4.00</text:p>
          </table:table-cell>
          <table:table-cell office:value-type="float" office:value="5.6" calcext:value-type="float">
            <text:p>5.60</text:p>
          </table:table-cell>
          <table:table-cell/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94" calcext:value-type="float">
            <text:p>32.94</text:p>
          </table:table-cell>
          <table:table-cell table:number-columns-repeated="2"/>
          <table:table-cell office:value-type="float" office:value="36.35" calcext:value-type="float">
            <text:p>36.35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float" office:value="15.26" calcext:value-type="float">
            <text:p>15.26</text:p>
          </table:table-cell>
          <table:table-cell office:value-type="float" office:value="7.77" calcext:value-type="float">
            <text:p>7.77</text:p>
          </table:table-cell>
          <table:table-cell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.28" calcext:value-type="float">
            <text:p>42.28</text:p>
          </table:table-cell>
          <table:table-cell table:number-columns-repeated="2"/>
          <table:table-cell office:value-type="float" office:value="30.76" calcext:value-type="float">
            <text:p>30.76</text:p>
          </table:table-cell>
          <table:table-cell office:value-type="float" office:value="5.56" calcext:value-type="float">
            <text:p>5.56</text:p>
          </table:table-cell>
          <table:table-cell/>
          <table:table-cell office:value-type="float" office:value="13.07" calcext:value-type="float">
            <text:p>13.07</text:p>
          </table:table-cell>
          <table:table-cell office:value-type="float" office:value="8.33" calcext:value-type="float">
            <text:p>8.33</text:p>
          </table:table-cell>
          <table:table-cell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.3" calcext:value-type="float">
            <text:p>41.30</text:p>
          </table:table-cell>
          <table:table-cell table:number-columns-repeated="2"/>
          <table:table-cell office:value-type="float" office:value="35.6" calcext:value-type="float">
            <text:p>35.60</text:p>
          </table:table-cell>
          <table:table-cell office:value-type="float" office:value="7.9" calcext:value-type="float">
            <text:p>7.90</text:p>
          </table:table-cell>
          <table:table-cell/>
          <table:table-cell office:value-type="float" office:value="7" calcext:value-type="float">
            <text:p>7.00</text:p>
          </table:table-cell>
          <table:table-cell office:value-type="float" office:value="7.5" calcext:value-type="float">
            <text:p>7.5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Mustapha and Muss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 table:number-rows-repeated="104850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fish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1" table:default-cell-style-name="ce6"/>
        <table:table-column table:style-name="co1" table:number-columns-repeated="9" table:default-cell-style-name="ce8"/>
        <table:table-row table:style-name="ro1">
          <table:table-cell table:style-name="ce1" office:value-type="string" calcext:value-type="string">
            <text:p>Date (dd/mm/year)</text:p>
          </table:table-cell>
          <table:table-cell office:value-type="string" calcext:value-type="string">
            <text:p>Si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Transect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Assistant</text:p>
          </table:table-cell>
          <table:table-cell table:style-name="ce1" office:value-type="string" calcext:value-type="string">
            <text:p>Tide</text:p>
          </table:table-cell>
          <table:table-cell table:style-name="ce1" office:value-type="string" calcext:value-type="string">
            <text:p>Exposure</text:p>
          </table:table-cell>
          <table:table-cell table:style-name="ce1" office:value-type="string" calcext:value-type="string">
            <text:p>Depth (m)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office:value-type="string" calcext:value-type="string">
            <text:p>transect siize</text:p>
          </table:table-cell>
          <table:table-cell office:value-type="string" calcext:value-type="string">
            <text:p>Family Group</text:p>
          </table:table-cell>
          <table:table-cell table:style-name="ce1" office:value-type="string" calcext:value-type="string">
            <text:p>3-10cm</text:p>
          </table:table-cell>
          <table:table-cell table:style-name="ce1" office:value-type="string" calcext:value-type="string">
            <text:p>10-20 cm</text:p>
          </table:table-cell>
          <table:table-cell table:style-name="ce1" office:value-type="string" calcext:value-type="string">
            <text:p>20-30cm</text:p>
          </table:table-cell>
          <table:table-cell table:style-name="ce1" office:value-type="string" calcext:value-type="string">
            <text:p>30-40</text:p>
          </table:table-cell>
          <table:table-cell table:style-name="ce1" office:value-type="string" calcext:value-type="string">
            <text:p>40-50</text:p>
          </table:table-cell>
          <table:table-cell table:style-name="ce1" office:value-type="string" calcext:value-type="string">
            <text:p>50-60</text:p>
          </table:table-cell>
          <table:table-cell table:style-name="ce1" office:value-type="string" calcext:value-type="string">
            <text:p>60-70</text:p>
          </table:table-cell>
          <table:table-cell table:style-name="ce1" office:value-type="string" calcext:value-type="string">
            <text:p>70-80</text:p>
          </table:table-cell>
          <table:table-cell table:style-name="ce1" office:value-type="string" calcext:value-type="string">
            <text:p>&gt;8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canthurida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ulostom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Balistida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ang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haetodontida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Diodontida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Fistularida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aemu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olocentrid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ab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ethr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Lutjanidae/Nemipt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llid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emph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Penguipedidae/Syn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anth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entridae</text:p>
          </table:table-cell>
          <table:table-cell office:value-type="float" office:value="1221" calcext:value-type="float">
            <text:p>1221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arida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orp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err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ig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phy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esio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charh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Ginglymostoma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Rhinc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Others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canthurid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ulostom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Balistid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ang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haetodontid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Diodontida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Fistula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aemu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olocentrida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abrida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ethr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Lutjanidae/Nemipt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llida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emph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Penguipedidae/Syn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anth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entridae</text:p>
          </table:table-cell>
          <table:table-cell office:value-type="float" office:value="677" calcext:value-type="float">
            <text:p>677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aridae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orp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err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iganida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phy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esio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charh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Ginglymostoma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Rhinc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Others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canthurida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ulostom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Balistidae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ang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haetodontida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Di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Fistula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aemu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olocentrid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ab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ethr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Lutjanidae/Nemipt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llid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emph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Penguipedidae/Syn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anth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entridae</text:p>
          </table:table-cell>
          <table:table-cell office:value-type="float" office:value="579" calcext:value-type="float">
            <text:p>57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aridae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orpaenidae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err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ig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phy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esio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charh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Ginglymostoma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Rhinc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Others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canthurida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ulostom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Balistida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ang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haetodontid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Diodontida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Fistula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aemu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olocentrida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abrida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ethr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Lutjanidae/Nemipt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llidae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emph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Penguipedidae/Syn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anth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entridae</text:p>
          </table:table-cell>
          <table:table-cell office:value-type="float" office:value="487" calcext:value-type="float">
            <text:p>48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arida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orp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err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ig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phy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esio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charh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Ginglymostoma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Rhinc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Others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canthurid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ulostom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Balis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ang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haetodontid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Diodontidae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Fistula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aemu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olocent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abrida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ethr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Lutjanidae/Nemipt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llida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emph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Penguipedidae/Synodontida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anthidae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entridae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arida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orp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erranida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iganida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phy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esio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charh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Ginglymostoma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Rhinc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Others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canthurida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ulostom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Balis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ang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haetodontida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Diodontidae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Fistula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aemu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olocent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abridae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ethr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Lutjanidae/Nemipteridae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llida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empherid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Penguipedidae/Syn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anthidae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entridae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arida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orp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err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ig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phy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esio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charh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Ginglymostoma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Rhinc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Others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canthurida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ulostom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Balis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ang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haetodontid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Di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Fistula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aemu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olocent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abrida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ethr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Lutjanidae/Nemipt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llidae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emph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Penguipedidae/Synodontida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anth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entridae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arida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orp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err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ig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phy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esio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charh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Ginglymostoma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Rhinc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Others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canthurida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ulostom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Balis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ang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haetodontid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Diodontidae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Fistula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aemu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olocent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abrida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ethrinida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Lutjanidae/Nemipterid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llida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emph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Penguipedidae/Syn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anthida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entridae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a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orp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err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ig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phy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esio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charh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Ginglymostoma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Rhinc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Others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canthurid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ulostom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Balis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ang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haetodontid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Di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Fistula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aemu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olocent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abrida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ethr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Lutjanidae/Nemipt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llida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emph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Penguipedidae/Synodontid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anthidae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entridae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arida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orp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erranida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ig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phy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esio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charh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Ginglymostoma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Rhinc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Others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canthurida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ulostom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Balis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ang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haetodontida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Di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Fistula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aemu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olocent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abrid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ethr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Lutjanidae/Nemipt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llida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emph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Penguipedidae/Synodontidae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anthid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entridae</text:p>
          </table:table-cell>
          <table:table-cell office:value-type="float" office:value="68" calcext:value-type="float">
            <text:p>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aridae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orp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err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ig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phy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esio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charh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Ginglymostoma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Rhinc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Others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canthurida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ulostom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Balis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ang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haetodontidae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Di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Fistula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aemu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olocent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abrida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ethrinida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Lutjanidae/Nemipt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llidae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emph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Penguipedidae/Syn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anthida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entridae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aridae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orp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err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ig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phy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esio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charh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Ginglymostoma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Rhinc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Others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canthurida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Aulostom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Balis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ang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haetodontida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Diodontida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Fistula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aemu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Holocent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abrida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Lethr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Lutjanidae/Nemipterid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ll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Mu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empher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table:style-name="ce7" office:value-type="string" calcext:value-type="string">
            <text:p>Penguipedidae/Syn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anthid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Pomacentridae</text:p>
          </table:table-cell>
          <table:table-cell office:value-type="float" office:value="132" calcext:value-type="float">
            <text:p>1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aridae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corp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err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iga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Sphyrae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esio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Carcharhin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Ginglymostoma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Rhincodontida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string" calcext:value-type="string">
            <text:p>50*5</text:p>
          </table:table-cell>
          <table:table-cell office:value-type="string" calcext:value-type="string">
            <text:p>Others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table table:name="Recruits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Date (dd/mm/year)</text:p>
          </table:table-cell>
          <table:table-cell office:value-type="string" calcext:value-type="string">
            <text:p>Si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Transect</text:p>
          </table:table-cell>
          <table:table-cell table:style-name="ce1" office:value-type="string" calcext:value-type="string">
            <text:p>Quadrant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Assistant</text:p>
          </table:table-cell>
          <table:table-cell table:style-name="ce1" office:value-type="string" calcext:value-type="string">
            <text:p>Tide</text:p>
          </table:table-cell>
          <table:table-cell table:style-name="ce1" office:value-type="string" calcext:value-type="string">
            <text:p>Exposure</text:p>
          </table:table-cell>
          <table:table-cell table:style-name="ce1" office:value-type="string" calcext:value-type="string">
            <text:p>Depth (m)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0-2.5</text:p>
          </table:table-cell>
          <table:table-cell office:value-type="string" calcext:value-type="string">
            <text:p>2.5-5</text:p>
          </table:table-cell>
          <table:table-cell office:value-type="string" calcext:value-type="string">
            <text:p>5-7.5</text:p>
          </table:table-cell>
          <table:table-cell office:value-type="string" calcext:value-type="string">
            <text:p>7.5-1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orites(m)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Acropo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ocillopo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Fungia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Fav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avon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Millepo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Galaxe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Acropo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Millepo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Millepo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ocillopor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Acropor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avo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Fung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orites(m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Acropor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Lobophylli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ocillopo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lerogyr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Millepo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Alveop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Fungia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lerogyra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Acropo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Millepo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Acropor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orites(m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Herpolith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Galaxe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ocillopo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lerogyr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Acropo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Pavon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Fung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string" calcext:value-type="string">
            <text:p>Tubipo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Acropo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Millepor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Pocillopo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Pavon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Halomit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Acropo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Pavo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Porites(m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Galax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Pocillopo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Galaxea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Gardineroseri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Acropor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Porites(m)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meru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Favit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Millepor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Favi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Acropo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Porites(m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Pavon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Synare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Galaxe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Acropo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Fungia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Seriatopor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Platygyr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Leptoser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Fav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Fungi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Pocillopor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Acropo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Sing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404" calcext:value-type="float">
            <text:p>-10.313404</text:p>
          </table:table-cell>
          <table:table-cell office:value-type="float" office:value="40.374262" calcext:value-type="float">
            <text:p>40.374262</text:p>
          </table:table-cell>
          <table:table-cell office:value-type="string" calcext:value-type="string">
            <text:p>Millepor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Invertebrates" table:style-name="ta1">
        <table:table-column table:style-name="co1" table:number-columns-repeated="21" table:default-cell-style-name="Default"/>
        <table:table-row table:style-name="ro2">
          <table:table-cell table:style-name="ce1" office:value-type="string" calcext:value-type="string">
            <text:p>Date (dd/mm/year)</text:p>
          </table:table-cell>
          <table:table-cell office:value-type="string" calcext:value-type="string">
            <text:p>Si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Transect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Assistant</text:p>
          </table:table-cell>
          <table:table-cell table:style-name="ce1" office:value-type="string" calcext:value-type="string">
            <text:p>Tide</text:p>
          </table:table-cell>
          <table:table-cell table:style-name="ce1" office:value-type="string" calcext:value-type="string">
            <text:p>Exposure</text:p>
          </table:table-cell>
          <table:table-cell table:style-name="ce1" office:value-type="string" calcext:value-type="string">
            <text:p>Depth (m)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9" office:value-type="string" calcext:value-type="string">
            <text:p>Urchin</text:p>
          </table:table-cell>
          <table:table-cell table:style-name="ce9" office:value-type="string" calcext:value-type="string">
            <text:p>Sea cucumber</text:p>
          </table:table-cell>
          <table:table-cell table:style-name="ce9" office:value-type="string" calcext:value-type="string">
            <text:p>Gastropods</text:p>
          </table:table-cell>
          <table:table-cell table:style-name="ce9" office:value-type="string" calcext:value-type="string">
            <text:p>Sea star</text:p>
          </table:table-cell>
          <table:table-cell table:style-name="ce10" office:value-type="string" calcext:value-type="string">
            <text:p>bivalves</text:p>
          </table:table-cell>
          <table:table-cell table:style-name="ce10" office:value-type="string" calcext:value-type="string">
            <text:p>octopus</text:p>
          </table:table-cell>
          <table:table-cell table:style-name="ce10" office:value-type="string" calcext:value-type="string">
            <text:p>worms</text:p>
          </table:table-cell>
          <table:table-cell table:style-name="ce10" office:value-type="string" calcext:value-type="string">
            <text:p>COTs</text:p>
          </table:table-cell>
          <table:table-cell table:style-name="ce10" office:value-type="string" calcext:value-type="string">
            <text:p>others</text:p>
          </table:table-cell>
          <table:table-cell table:style-name="ce11"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03-2026</text:p>
          </table:table-cell>
          <table:table-cell office:value-type="string" calcext:value-type="string">
            <text:p>MBREMP</text:p>
          </table:table-cell>
          <table:table-cell office:value-type="string" calcext:value-type="string">
            <text:p>Chamba Cha Kat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e Zone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heltered</text:p>
          </table:table-cell>
          <table:table-cell office:value-type="float" office:value="4" calcext:value-type="float">
            <text:p>4</text:p>
          </table:table-cell>
          <table:table-cell office:value-type="float" office:value="-10.313727" calcext:value-type="float">
            <text:p>-10.313727</text:p>
          </table:table-cell>
          <table:table-cell office:value-type="float" office:value="40.374487" calcext:value-type="float">
            <text:p>40.374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Acces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 Acces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 Acces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en Acces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Acces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Nusu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Acces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5" calcext:value-type="float">
            <text:p>5</text:p>
          </table:table-cell>
          <table:table-cell office:value-type="float" office:value="-10.220442" calcext:value-type="float">
            <text:p>-10.220442</text:p>
          </table:table-cell>
          <table:table-cell office:value-type="float" office:value="40.213191" calcext:value-type="float">
            <text:p>40.2131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Acces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 Acces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 Acces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en Acces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Acces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03-2026</text:p>
          </table:table-cell>
          <table:table-cell office:value-type="string" calcext:value-type="string">
            <text:p>Msanga Mkuu</text:p>
          </table:table-cell>
          <table:table-cell office:value-type="string" calcext:value-type="string">
            <text:p>Viul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Acces</text:p>
          </table:table-cell>
          <table:table-cell office:value-type="string" calcext:value-type="string">
            <text:p>Ur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xposed</text:p>
          </table:table-cell>
          <table:table-cell office:value-type="float" office:value="4" calcext:value-type="float">
            <text:p>4</text:p>
          </table:table-cell>
          <table:table-cell office:value-type="float" office:value="-10.194065" calcext:value-type="float">
            <text:p>-10.194065</text:p>
          </table:table-cell>
          <table:table-cell office:value-type="float" office:value="40.21902" calcext:value-type="float">
            <text:p>40.219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/>
    <style:font-face style:name="Arimo" svg:font-family="Arim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0">
      <number:text-content/>
      <style:map style:condition="value()&lt;=1.7976931348623157E+308" style:apply-style-name="N140P0"/>
    </number:text-style>
    <number:number-style style:name="N141">
      <number:number number:decimal-places="1" number:min-decimal-places="1" number:min-integer-digits="1"/>
    </number:number-style>
    <number:number-style style:name="N142">
      <number:number number:decimal-places="3" number:min-decimal-places="3" number:min-integer-digits="1"/>
    </number:number-style>
    <number:date-style style:name="N143">
      <number:month number:style="long" number:textual="true"/>
      <number:text> </number:text>
      <number:day/>
      <number:text>, </number:text>
      <number:year number:style="long"/>
    </number:date-style>
    <number:date-style style:name="N1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3T16:40:04.387714300</meta:creation-date>
    <dc:date>2026-03-24T16:56:10.743752000</dc:date>
    <meta:editing-duration>PT2H3M25S</meta:editing-duration>
    <meta:editing-cycles>11</meta:editing-cycles>
    <meta:generator>LibreOffice/26.2.1.2$Windows_X86_64 LibreOffice_project/620$Build-2</meta:generator>
    <meta:document-statistic meta:table-count="4" meta:cell-count="9827" meta:object-count="0"/>
  </office:meta>
</office:document-meta>
</file>